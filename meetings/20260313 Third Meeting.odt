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11in" fo:margin-left="0.0035in" fo:margin-top="0in" fo:margin-bottom="0in" table:align="left" style:writing-mode="lr-tb"/>
    </style:style>
    <style:style style:name="Table1.A" style:family="table-column">
      <style:table-column-properties style:column-width="3.1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de" fo:country="AT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de" fo:country="AT" officeooo:rsid="0025f8c2" officeooo:paragraph-rsid="0025f8c2" style:letter-kerning="true" style:font-name-asian="Aptos1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de" fo:country="AT" officeooo:paragraph-rsid="002528eb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Standard">
      <style:text-properties fo:language="en" fo:country="US" fo:font-weight="bold" officeooo:rsid="001dab3d" officeooo:paragraph-rsid="001dab3d" style:font-weight-asian="bold" style:font-weight-complex="bold"/>
    </style:style>
    <style:style style:name="P5" style:family="paragraph" style:parent-style-name="Standard">
      <style:text-properties fo:language="en" fo:country="US" fo:font-weight="normal" officeooo:rsid="001f660e" officeooo:paragraph-rsid="002a92d5" style:font-weight-asian="normal" style:font-weight-complex="normal"/>
    </style:style>
    <style:style style:name="P6" style:family="paragraph" style:parent-style-name="Standard">
      <style:text-properties fo:language="en" fo:country="US" fo:font-weight="bold" style:font-weight-asian="bold" style:font-weight-complex="bold"/>
    </style:style>
    <style:style style:name="P7" style:family="paragraph" style:parent-style-name="Standard">
      <style:text-properties fo:language="en" fo:country="US" fo:font-weight="normal" officeooo:rsid="001f660e" officeooo:paragraph-rsid="001f660e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0ce24" officeooo:paragraph-rsid="002a92d5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0ce24" officeooo:paragraph-rsid="0020ce24" style:font-weight-asian="normal" style:font-weight-complex="normal"/>
    </style:style>
    <style:style style:name="P10" style:family="paragraph" style:parent-style-name="Standard">
      <style:text-properties fo:language="en" fo:country="US" fo:font-weight="normal" style:font-weight-asian="normal" style:font-weight-complex="normal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fo:font-weight="normal" officeooo:rsid="0020ce24" officeooo:paragraph-rsid="002be232" style:font-weight-asian="normal" style:font-weight-complex="normal"/>
    </style:style>
    <style:style style:name="P13" style:family="paragraph" style:parent-style-name="List_20_Paragraph" style:list-style-name="WWNum4">
      <style:text-properties fo:language="en" fo:country="US"/>
    </style:style>
    <style:style style:name="P14" style:family="paragraph" style:parent-style-name="List_20_Paragraph" style:list-style-name="WWNum4">
      <style:text-properties fo:language="en" fo:country="US" officeooo:rsid="0027a594" officeooo:paragraph-rsid="0027a594"/>
    </style:style>
    <style:style style:name="P15" style:family="paragraph" style:parent-style-name="List_20_Paragraph">
      <style:text-properties fo:language="en" fo:country="US"/>
    </style:style>
    <style:style style:name="P16" style:family="paragraph" style:parent-style-name="List_20_Paragraph">
      <style:text-properties fo:language="en" fo:country="US" officeooo:rsid="002d263f" officeooo:paragraph-rsid="002d263f"/>
    </style:style>
    <style:style style:name="T1" style:family="text">
      <style:text-properties officeooo:rsid="0035226e"/>
    </style:style>
    <style:style style:name="T2" style:family="text">
      <style:text-properties officeooo:rsid="00340148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28a8c3" style:font-weight-asian="normal" style:font-weight-complex="normal"/>
    </style:style>
    <style:style style:name="T6" style:family="text">
      <style:text-properties style:text-underline-style="none" fo:font-weight="normal" officeooo:rsid="002528eb" style:font-weight-asian="normal" style:font-weight-complex="normal"/>
    </style:style>
    <style:style style:name="T7" style:family="text">
      <style:text-properties style:text-underline-style="none" fo:font-weight="normal" officeooo:rsid="001f660e" style:font-weight-asian="normal" style:font-weight-complex="normal"/>
    </style:style>
    <style:style style:name="T8" style:family="text">
      <style:text-properties fo:font-weight="normal" officeooo:rsid="001f660e" style:font-weight-asian="normal" style:font-weight-complex="normal"/>
    </style:style>
    <style:style style:name="T9" style:family="text">
      <style:text-properties fo:font-weight="normal" officeooo:rsid="002528eb" style:font-weight-asian="normal" style:font-weight-complex="normal"/>
    </style:style>
    <style:style style:name="T10" style:family="text">
      <style:text-properties officeooo:rsid="00311ef2"/>
    </style:style>
    <style:style style:name="T11" style:family="text">
      <style:text-properties officeooo:rsid="0027a594"/>
    </style:style>
    <style:style style:name="T12" style:family="text">
      <style:text-properties officeooo:rsid="002a92d5"/>
    </style:style>
    <style:style style:name="T13" style:family="text">
      <style:text-properties officeooo:rsid="002528eb"/>
    </style:style>
    <style:style style:name="T14" style:family="text">
      <style:text-properties officeooo:rsid="0020ce24"/>
    </style:style>
    <style:style style:name="T15" style:family="text">
      <style:text-properties officeooo:rsid="002e0001"/>
    </style:style>
    <style:style style:name="T16" style:family="text">
      <style:text-properties officeooo:rsid="002f43c2"/>
    </style:style>
    <style:style style:name="T17" style:family="text">
      <style:text-properties officeooo:rsid="002aead3"/>
    </style:style>
    <style:style style:name="T18" style:family="text">
      <style:text-properties officeooo:rsid="00321bee"/>
    </style:style>
    <style:style style:name="T19" style:family="text">
      <style:text-properties officeooo:rsid="002be232"/>
    </style:style>
    <style:style style:name="T20" style:family="text">
      <style:text-properties fo:language="en" fo:country="US"/>
    </style:style>
    <style:style style:name="T21" style:family="text">
      <style:text-properties officeooo:rsid="002d35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Meeting Date</text:p>
          </table:table-cell>
          <table:table-cell table:style-name="Table1.A1" office:value-type="string">
            <text:p text:style-name="P1">1<text:span text:style-name="T1">3</text:span>.03.2026</text:p>
          </table:table-cell>
        </table:table-row>
        <table:table-row table:style-name="Table1.1">
          <table:table-cell table:style-name="Table1.A1" office:value-type="string">
            <text:p text:style-name="P1">Begin Time</text:p>
          </table:table-cell>
          <table:table-cell table:style-name="Table1.A1" office:value-type="string">
            <text:p text:style-name="P2">12:00</text:p>
          </table:table-cell>
        </table:table-row>
        <table:table-row table:style-name="Table1.1">
          <table:table-cell table:style-name="Table1.A1" office:value-type="string">
            <text:p text:style-name="P1">End Time</text:p>
          </table:table-cell>
          <table:table-cell table:style-name="Table1.A1" office:value-type="string">
            <text:p text:style-name="P2">13:<text:span text:style-name="T2">35</text:span></text:p>
          </table:table-cell>
        </table:table-row>
        <table:table-row table:style-name="Table1.1">
          <table:table-cell table:style-name="Table1.A1" office:value-type="string">
            <text:p text:style-name="P1">Attended People</text:p>
          </table:table-cell>
          <table:table-cell table:style-name="Table1.A1" office:value-type="string">
            <text:p text:style-name="P3">Hörmansdorfer Moritz, Salnikow Nina, Oberhumer Dominik, Vasiliki Fragkia</text:p>
          </table:table-cell>
        </table:table-row>
      </table:table>
      <text:p text:style-name="Standard"/>
      <text:h text:style-name="Heading_20_1" text:outline-level="1">Discussed Topics</text:h>
      <text:p text:style-name="Standard" loext:marker-style-name="T3"><text:span text:style-name="T3">Would focusing on tree gaps be useful for you or do you have other priorities for this project?</text:span></text:p>
      <text:p text:style-name="P4"><text:span text:style-name="T4">Yes</text:span><text:span text:style-name="T5">, t</text:span><text:span text:style-name="T6">hey want a</text:span><text:span text:style-name="T7"> d</text:span><text:span text:style-name="T8">atabase, </text:span><text:span text:style-name="T9">that give individual position of trees.</text:span></text:p>
      <text:p text:style-name="P5"><text:span text:style-name="T10">And a</text:span><text:span text:style-name="T11"> ML m</text:span>ethod <text:span text:style-name="T11">that can be applied </text:span>to other cities<text:span text:style-name="T12"> t</text:span><text:span text:style-name="T13">hat </text:span><text:span text:style-name="T11">do </text:span><text:span text:style-name="T13">not have Baumkataster </text:span><text:span text:style-name="T12">data</text:span><text:span text:style-name="T14"> like </text:span><text:span text:style-name="T12">V</text:span><text:span text:style-name="T14">ienna to detects all tre</text:span><text:span text:style-name="T11">e</text:span><text:span text:style-name="T14">s </text:span><text:span text:style-name="T10">to detect tree gaps/heat risk e.g.</text:span></text:p>
      <text:p text:style-name="P6" loext:marker-style-name="T3"/>
      <text:p text:style-name="Standard" loext:marker-style-name="T3"><text:span text:style-name="T3">Do you have a preference for the final product, something we should include? </text:span></text:p>
      <text:p text:style-name="P7">get individual tree location → <text:span text:style-name="T15">we have a lot of freedom, they want to know if cities have tree gaps e.g.</text:span></text:p>
      <text:p text:style-name="P7"><text:span text:style-name="T16">I</text:span><text:span text:style-name="T17">dea from Moritz: </text:span>classification model to identify tree</text:p>
      <text:p text:style-name="P8">Machine Learning model to pre<text:span text:style-name="T12">d</text:span>i<text:span text:style-name="T12">c</text:span>t individual trees <text:span text:style-name="T12">position</text:span></text:p>
      <text:p text:style-name="P8">→ <text:span text:style-name="T12">maybe can start by </text:span><text:span text:style-name="T10">trying to predict</text:span><text:span text:style-name="T12"> average of trees in a </text:span><text:span text:style-name="T10">10m </text:span><text:span text:style-name="T12">zone</text:span>, <text:span text:style-name="T12">then get a total numbers of trees per city </text:span><text:span text:style-name="T10">for the database </text:span></text:p>
      <text:p text:style-name="P9"><text:span text:style-name="T12">I</text:span>mportant: <text:span text:style-name="T12">get 2 to 4 kind of pictures to distinguish between</text:span> seasons → the tree <text:span text:style-name="T12">color</text:span> change <text:span text:style-name="T12">ofc</text:span></text:p>
      <text:p text:style-name="P10"/>
      <text:p text:style-name="Standard" loext:marker-style-name="T3"><text:span text:style-name="T3">Regarding computation: should we use the standard WU tools, or do you prefer another setup?</text:span></text:p>
      <text:p text:style-name="P9"><text:span text:style-name="T11">T</text:span>hey don’t pr<text:span text:style-name="T18">o</text:span>vide <text:span text:style-name="T19">anything, </text:span><text:s/>we need <text:span text:style-name="T19">WU</text:span> cloud <text:span text:style-name="T13">for fetching and</text:span> ML training <text:span text:style-name="T19">if our laptops cannot handle it</text:span></text:p>
      <text:p text:style-name="P11" loext:marker-style-name="T20"><text:soft-page-break/></text:p>
      <text:p text:style-name="Standard" loext:marker-style-name="T3"><text:span text:style-name="T3">How often would you like to meet for updates or feedback? </text:span></text:p>
      <text:p text:style-name="P12">We will set up Teams <text:span text:style-name="T19">and </text:span>meeting <text:span text:style-name="T19">F</text:span>ridays 12<text:span text:style-name="T19">amish</text:span></text:p>
      <text:p text:style-name="P12"><text:span text:style-name="T19">Only set up meeting if needed, does not have to be weekly → </text:span>we can also just upload <text:span text:style-name="T19">our progress for more convenience</text:span></text:p>
      <text:p text:style-name="P6" loext:marker-style-name="T3"/>
      <text:h text:style-name="Heading_20_1" text:outline-level="1" loext:marker-style-name="T20"><text:span text:style-name="T20">Follow Up</text:span><text:span text:style-name="T20"/></text:h>
      <text:list text:style-name="WWNum4">
        <text:list-item>
          <text:p text:style-name="P13" loext:marker-style-name="T20">We will all meet on <text:span text:style-name="T13">Sunday 8pm to finalize the project proposal</text:span></text:p>
        </text:list-item>
        <text:list-item>
          <text:p text:style-name="P14" loext:marker-style-name="T20">We have to ask for all the links to the APIs they recommended</text:p>
        </text:list-item>
      </text:list>
      <text:p text:style-name="P15" loext:marker-style-name="T20"/>
      <text:p text:style-name="P16" loext:marker-style-name="T20">Currently we only <text:span text:style-name="T21">found this manually</text:span>:</text:p>
      <text:p text:style-name="P16" loext:marker-style-name="T20"><text:a xlink:type="simple" xlink:href="https://browser.dataspace.copernicus.eu/?zoom=19&amp;lat=48.17325&amp;lng=16.37143&amp;themeId=MONITORING&amp;visualizationUrl=U2FsdGVkX18S2UoMzDjDR0hJVx%2BLBMQ3ADSME5wz1Yltp3vTkg225WMNufaHUn2adQArXt1pzZJ6D%2FUye4PJI8JtNrYMeoL1z1z4dqck7yEbQDq1ALT9nDXEP8POfnrV&amp;datasetId=S2_L2A_CDAS&amp;demSource3D=%22MAPZEN%22&amp;cloudCoverage=30&amp;dateMode=SINGLE#error=login_required&amp;state=3e8c623a-d96e-4feb-9ada-3680d6a1ef52&amp;iss=https%3A%2F%2Fidentity.dataspace.copernicus.eu%2Fauth%2Frealms%2FCDSE" text:style-name="Internet_20_link" text:visited-style-name="Visited_20_Internet_20_Link">https://browser.dataspace.copernicus.eu/?zoom=19&amp;lat=48.17325&amp;lng=16.37143&amp;themeId=MONITORING&amp;visualizationUrl=U2FsdGVkX18S2UoMzDjDR0hJVx%2BLBMQ3ADSME5wz1Yltp3vTkg225WMNufaHUn2adQArXt1pzZJ6D%2FUye4PJI8JtNrYMeoL1z1z4dqck7yEbQDq1ALT9nDXEP8POfnrV&amp;datasetId=S2_L2A_CDAS&amp;demSource3D=%22MAPZEN%22&amp;cloudCoverage=30&amp;dateMode=SINGLE#error=login_required&amp;state=3e8c623a-d96e-4feb-9ada-3680d6a1ef52&amp;iss=https%3A%2F%2Fidentity.dataspace.copernicus.eu%2Fauth%2Frealms%2FCDSE</text:a></text:p>
      <text:p text:style-name="P16" loext:marker-style-name="T20"/>
      <text:h text:style-name="Heading_20_1" text:outline-level="1" loext:marker-style-name="T20"><text:span text:style-name="T20">Emergencies</text:span><text:span text:style-name="T20"/></text:h>
      <text:p text:style-name="Standard" loext:marker-style-name="T20"><text:span text:style-name="T20"/></text:p>
      <text:p text:style-name="P11" loext:marker-style-name="T20"/>
      <text:p text:style-name="P11" loext:marker-style-name="T20"/>
      <text:p text:style-name="P11" loext:marker-style-name="T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de" fo:country="AT" style:letter-kerning="true" style:font-name-asian="Aptos1" style:font-size-asian="12pt" style:language-asian="en" style:country-asian="US" style:font-family-complex="'Noto Sans'" style:font-family-generic-complex="system" style:font-pitch-complex="variable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de" fo:country="AT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Zitat_20_Zchn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5_20_Zchn" style:display-name="Überschrift 5 Zchn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7_20_Zchn" style:display-name="Überschrift 7 Zchn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8_20_Zchn" style:display-name="Überschrift 8 Zchn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Zchn" style:display-name="Titel Zchn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Zitat_20_Zchn" style:display-name="Zitat Zch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Aptos" fo:font-family="Aptos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Aptos" fo:font-family="Aptos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language="en" fo:country="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" style:num-suffix="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ominik Oberhumer</meta:initial-creator>
    <meta:editing-cycles>77</meta:editing-cycles>
    <meta:creation-date>2026-03-10T16:25:00</meta:creation-date>
    <dc:date>2026-03-13T19:49:36.142858189</dc:date>
    <meta:editing-duration>PT26M36S</meta:editing-duration>
    <meta:generator>LibreOffice/25.8.4.2$Linux_X86_64 LibreOffice_project/580$Build-2</meta:generator>
    <meta:document-statistic meta:table-count="1" meta:image-count="0" meta:object-count="0" meta:page-count="2" meta:paragraph-count="29" meta:word-count="288" meta:character-count="2059" meta:non-whitespace-character-count="1798"/>
    <meta:user-defined meta:name="AppVersion">16.0000</meta:user-defined>
    <meta:template xlink:type="simple" xlink:actuate="onRequest" xlink:title="Normal.dotm" xlink:href=""/>
  </office:meta>
</office:document-meta>
</file>